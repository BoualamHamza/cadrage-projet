
<file path=META-INF/manifest.xml><?xml version="1.0" encoding="utf-8"?>
<manifest:manifest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spreadsheet"/>
  <manifest:file-entry manifest:full-path="media/image1.png" manifest:media-type="image/png"/>
</manifest:manifest>
</file>

<file path=content.xml><?xml version="1.0" encoding="utf-8"?>
<office:document-content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14.25pt" style:use-optimal-row-height="false" fo:break-before="page"/>
    </style:style>
    <style:style style:name="ro24" style:family="table-row">
      <style:table-row-properties style:row-height="30pt" style:use-optimal-row-height="false" fo:break-before="page"/>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ext:p>Fashion-Insta SAS</text:p>
          </table:table-cell>
          <table:table-cell office:value-type="string" table:style-name="ce24">
            <text:p>Prénom :</text:p>
          </table:table-cell>
          <table:table-cell table:style-name="ce23">
            <text:p>(personne morale)</text:p>
          </table:table-cell>
          <table:table-cell office:value-type="string" table:style-name="ce24">
            <text:p>Adresse :</text:p>
          </table:table-cell>
          <table:table-cell table:style-name="ce23">
            <text:p>12 rue de la Mode</text:p>
          </table:table-cell>
          <table:table-cell office:value-type="string" table:style-name="ce24">
            <text:p>Adresse mél :</text:p>
          </table:table-cell>
          <table:table-cell table:style-name="ce25">
            <text:p>rgpd@fashion-insta.com</text:p>
          </table:table-cell>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ext:p>75002</text:p>
          </table:table-cell>
          <table:table-cell office:value-type="string" table:style-name="ce29">
            <text:p>Ville :</text:p>
          </table:table-cell>
          <table:table-cell table:style-name="ce28">
            <text:p>Paris</text:p>
          </table:table-cell>
          <table:table-cell office:value-type="string" table:style-name="ce29">
            <text:p>Téléphone :</text:p>
          </table:table-cell>
          <table:table-cell table:style-name="ce28">
            <text:p>01 XX XX XX XX</text:p>
          </table:table-cell>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ext:p>Non applicable — responsable de traitement établi dans l'UE (France)</text:p>
          </table:table-cell>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ext:p>DPO Fashion-Insta</text:p>
          </table:table-cell>
          <table:table-cell office:value-type="string" table:style-name="ce24">
            <text:p>Prénom :</text:p>
          </table:table-cell>
          <table:table-cell table:style-name="ce34"/>
          <table:table-cell office:value-type="string" table:style-name="ce22">
            <text:p>Société (si DPO externe) :</text:p>
          </table:table-cell>
          <table:table-cell table:style-name="ce23">
            <text:p>N/A (DPO interne)</text:p>
          </table:table-cell>
          <table:table-cell office:value-type="string" table:style-name="ce24">
            <text:p>Adresse :</text:p>
          </table:table-cell>
          <table:table-cell table:style-name="ce35">
            <text:p>12 rue de la Mode</text:p>
          </table:table-cell>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ext:p>75002</text:p>
          </table:table-cell>
          <table:table-cell office:value-type="string" table:style-name="ce29">
            <text:p>Ville :</text:p>
          </table:table-cell>
          <table:table-cell table:style-name="ce36">
            <text:p>Paris</text:p>
          </table:table-cell>
          <table:table-cell office:value-type="string" table:style-name="ce29">
            <text:p>Téléphone :</text:p>
          </table:table-cell>
          <table:table-cell table:style-name="ce36">
            <text:p>01 XX XX XX XX</text:p>
          </table:table-cell>
          <table:table-cell office:value-type="string" table:style-name="ce29">
            <text:p>Adresse mél :</text:p>
          </table:table-cell>
          <table:table-cell table:style-name="ce36">
            <text:p>dpo@fashion-insta.com</text:p>
          </table:table-cell>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text:p>Recommandation vestimentaire basée sur la garde-robe</text:p>
          </table:table-cell>
          <table:table-cell table:style-name="ce46">
            <text:p>T-001</text:p>
          </table:table-cell>
          <table:table-cell table:style-name="ce47">
            <text:p>15/05/2026</text:p>
          </table:table-cell>
          <table:table-cell table:style-name="ce46">
            <text:p>10/07/2026</text:p>
          </table:table-cell>
          <table:table-cell table:number-columns-spanned="3" table:number-rows-spanned="1" table:style-name="ce62">
            <text:p>Proposer des articles du catalogue Fashion-Insta correspondant au style vestimentaire de l'utilisateur à partir de ses photos de garde-robe (détection, embeddings, matching, ré-entraînement périodique)</text:p>
          </table:table-cell>
          <table:covered-table-cell table:number-columns-repeated="2"/>
          <table:table-cell table:number-columns-spanned="2" table:number-rows-spanned="1" table:style-name="ce62">
            <text:p>Oui</text:p>
          </table:table-cell>
          <table:covered-table-cell/>
          <table:table-cell table:number-columns-repeated="17" table:style-name="ce44"/>
          <table:table-cell table:number-columns-repeated="16358"/>
        </table:table-row>
        <table:table-row table:style-name="ro2">
          <table:table-cell table:style-name="ce48">
            <text:p>Recommandation basée sur les préférences et tendances déclarées</text:p>
          </table:table-cell>
          <table:table-cell table:style-name="ce49">
            <text:p>T-002</text:p>
          </table:table-cell>
          <table:table-cell table:style-name="ce50">
            <text:p>15/05/2026</text:p>
          </table:table-cell>
          <table:table-cell table:style-name="ce49">
            <text:p>10/07/2026</text:p>
          </table:table-cell>
          <table:table-cell table:number-columns-spanned="3" table:number-rows-spanned="1" table:style-name="ce63">
            <text:p>Proposer des articles à partir des styles, marques et sources d'inspiration sélectionnés par l'utilisateur</text:p>
          </table:table-cell>
          <table:covered-table-cell table:number-columns-repeated="2"/>
          <table:table-cell table:number-columns-spanned="2" table:number-rows-spanned="1" table:style-name="ce63">
            <text:p>Non</text:p>
          </table:table-cell>
          <table:covered-table-cell/>
          <table:table-cell table:number-columns-repeated="17" table:style-name="ce44"/>
          <table:table-cell table:number-columns-repeated="16358"/>
        </table:table-row>
        <table:table-row table:style-name="ro2">
          <table:table-cell table:style-name="ce45">
            <text:p>Gestion du compte utilisateur</text:p>
          </table:table-cell>
          <table:table-cell table:style-name="ce46">
            <text:p>T-003</text:p>
          </table:table-cell>
          <table:table-cell table:style-name="ce47">
            <text:p>15/05/2026</text:p>
          </table:table-cell>
          <table:table-cell table:style-name="ce46">
            <text:p>10/07/2026</text:p>
          </table:table-cell>
          <table:table-cell table:number-columns-spanned="3" table:number-rows-spanned="1" table:style-name="ce62">
            <text:p>Authentification et gestion des droits de l'utilisateur sur l'application</text:p>
          </table:table-cell>
          <table:covered-table-cell table:number-columns-repeated="2"/>
          <table:table-cell table:number-columns-spanned="2" table:number-rows-spanned="1" table:style-name="ce62">
            <text:p>Non</text:p>
          </table:table-cell>
          <table:covered-table-cell/>
          <table:table-cell table:number-columns-repeated="17" table:style-name="ce44"/>
          <table:table-cell table:number-columns-repeated="16358"/>
        </table:table-row>
        <table:table-row table:style-name="ro2">
          <table:table-cell table:style-name="ce48">
            <text:p>Mesure d'audience / amélioration produit</text:p>
          </table:table-cell>
          <table:table-cell table:style-name="ce49">
            <text:p>T-004</text:p>
          </table:table-cell>
          <table:table-cell table:style-name="ce50">
            <text:p>15/05/2026</text:p>
          </table:table-cell>
          <table:table-cell table:style-name="ce49">
            <text:p>10/07/2026</text:p>
          </table:table-cell>
          <table:table-cell table:number-columns-spanned="3" table:number-rows-spanned="1" table:style-name="ce63">
            <text:p>Analyse statistique anonymisée de l'usage de l'application pour l'amélioration produit</text:p>
          </table:table-cell>
          <table:covered-table-cell table:number-columns-repeated="2"/>
          <table:table-cell table:number-columns-spanned="2" table:number-rows-spanned="1" table:style-name="ce63">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T-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ext:p>Recommandation vestimentaire basée sur la garde-rob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T-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ext:p>15/05/2026</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ext:p>10/07/2026</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208333333333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ext:p>Fashion-Insta SAS — Direction Produit (Alicia, VP Product), 12 rue de la Mode, 75002 Paris, France</text:p>
          </table:table-cell>
          <table:table-cell table:number-columns-repeated="5" table:style-name="ce79"/>
          <table:table-cell table:style-name="ce80">
            <text:p>01 XX XX XX XX</text:p>
          </table:table-cell>
          <table:table-cell table:style-name="ce68">
            <text:p>rgpd@fashion-insta.com</text:p>
          </table:table-cell>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ext:p>DPO Fashion-Insta, 12 rue de la Mode, 75002 Paris, France</text:p>
          </table:table-cell>
          <table:table-cell table:number-columns-repeated="5" table:style-name="ce82"/>
          <table:table-cell table:style-name="ce83">
            <text:p>01 XX XX XX XX</text:p>
          </table:table-cell>
          <table:table-cell table:style-name="ce68">
            <text:p>dpo@fashion-insta.com</text:p>
          </table:table-cell>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ext:p>N/A (DPO interne à Fashion-Insta)</text:p>
          </table:table-cell>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ext:p>Non applicable (responsable établi dans l'UE)</text:p>
          </table:table-cell>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5">
            <text:p>Non applicable</text:p>
          </table:table-cell>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ext:p>Proposer des articles du catalogue Fashion-Insta correspondant au style vestimentaire de l'utilisateur, à partir de ses photos de garde-rob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ext:p>Détection / segmentation automatique des vêtements présents sur les photo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ext:p>Génération d'un vecteur d'embedding du style utilisateur</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ext:p>Matching avec le catalogue produits et restitution dans l'application</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ext:p>Ré-entraînement périodique du modèle à partir du feedback utilisateur</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ext:p>Adresse mail, identifiant utilisateur ; photos de l'utilisateur portant ses vêtements (image de la personne) ; embeddings de style dérivés des photos (représentation vectorielle, pseudonyme fort)</text:p>
          </table:table-cell>
          <table:covered-table-cell table:number-columns-repeated="2"/>
          <table:table-cell table:number-columns-spanned="4" table:number-rows-spanned="1" table:style-name="ce112">
            <text:p>Compte : durée du compte + 12 mois. Photos et embeddings : 12 mois sans activité, ou suppression immédiate sur demand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ext:p>Préférences de style, marques et sources d'inspiration déclarées ; retours j'aime/je n'aime pas sur les recommandations</text:p>
          </table:table-cell>
          <table:covered-table-cell table:number-columns-repeated="2"/>
          <table:table-cell table:number-columns-spanned="4" table:number-rows-spanned="1" table:style-name="ce113">
            <text:p>Durée du compte (préférences) ; 36 mois (feedback, pour ré-entraînemen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ext:p>Non concerné (aucune donnée économique/financière dans ce traitement)</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ext:p>Logs d'accès aux images (journalisation de sécurité)</text:p>
          </table:table-cell>
          <table:covered-table-cell table:number-columns-repeated="2"/>
          <table:table-cell table:number-columns-spanned="4" table:number-rows-spanned="1" table:style-name="ce113">
            <text:p>12 moi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ext:p>Non concerné</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ext:p>Non concerné</text:p>
          </table:table-cell>
          <table:covered-table-cell table:number-columns-repeated="2"/>
          <table:table-cell table:number-columns-spanned="4" table:number-rows-spanned="1" table:style-name="ce113">
            <text:p>—</text:p>
          </table:table-cell>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4">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ext:p>Non collectée explicitement ; risque de biais indirect via les photos (cf. analyse des biais du modèle)</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ext:p>Non concerné</text:p>
          </table:table-cell>
          <table:covered-table-cell table:number-columns-repeated="2"/>
          <table:table-cell table:number-columns-spanned="4" table:number-rows-spanned="1" table:style-name="ce113">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ext:p>Non concerné</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ext:p>Non concerné</text:p>
          </table:table-cell>
          <table:covered-table-cell table:number-columns-repeated="2"/>
          <table:table-cell table:number-columns-spanned="4" table:number-rows-spanned="1" table:style-name="ce113">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ext:p>Non concerné</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ext:p>Photos de la personne portant ses vêtements et embeddings de style dérivés, traités par précaution comme données sensibles (image de la personne), bien que non utilisés à des fins d'identification biométrique stricte</text:p>
          </table:table-cell>
          <table:covered-table-cell table:number-columns-repeated="2"/>
          <table:table-cell table:number-columns-spanned="4" table:number-rows-spanned="1" table:style-name="ce113">
            <text:p>12 mois sans activité, ou suppression immédiate sur demand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ext:p>Non concerné</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ext:p>Non concerné</text:p>
          </table:table-cell>
          <table:covered-table-cell table:number-columns-repeated="2"/>
          <table:table-cell table:number-columns-spanned="4" table:number-rows-spanned="1" table:style-name="ce113">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ext:p>Non concerné</text:p>
          </table:table-cell>
          <table:covered-table-cell table:number-columns-repeated="2"/>
          <table:table-cell table:number-columns-spanned="4" table:number-rows-spanned="1" table:style-name="ce112">
            <text:p>—</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Clients</text:p>
          </table:table-cell>
          <table:covered-table-cell table:number-columns-repeated="2"/>
          <table:table-cell table:number-columns-spanned="4" table:number-rows-spanned="1" table:style-name="ce121">
            <text:p>Clients/prospects de Fashion-Insta ayant créé un compte sur l'application mobile et activé le service de recommand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ervice interne qui traite les données</text:p>
          </table:table-cell>
          <table:covered-table-cell table:number-columns-repeated="2"/>
          <table:table-cell table:number-columns-spanned="4" table:number-rows-spanned="1" table:style-name="ce113">
            <text:p>Équipe Produit &amp; Data Fashion-Insta — accès aux données pseudonymisées uniquemen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ext:p>Sous-traitants</text:p>
          </table:table-cell>
          <table:covered-table-cell table:number-columns-repeated="2"/>
          <table:table-cell table:number-columns-spanned="4" table:number-rows-spanned="1" table:style-name="ce112">
            <text:p>Cabinet Data Science (sous-traitant modèles), encadré par un contrat de sous-traitance RGPD (art. 28)</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ext:p>Sous-traitants</text:p>
          </table:table-cell>
          <table:covered-table-cell table:number-columns-repeated="2"/>
          <table:table-cell table:number-columns-spanned="4" table:number-rows-spanned="1" table:style-name="ce113">
            <text:p>Microsoft Azure (hébergement &amp; inférence), régions France Central / West Europe, convention de sous-traitanc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Chiffrement des données</text:p>
          </table:table-cell>
          <table:covered-table-cell table:number-columns-repeated="2"/>
          <table:table-cell table:number-columns-spanned="4" table:number-rows-spanned="1" table:style-name="ce126">
            <text:p>AES-256 au repos (Blob Storage), TLS 1.3 en transi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ext:p>Contrôle d'accès des utilisateurs</text:p>
          </table:table-cell>
          <table:covered-table-cell table:number-columns-repeated="2"/>
          <table:table-cell table:number-columns-spanned="4" table:number-rows-spanned="1" table:style-name="ce113">
            <text:p>Authentification forte (MFA) pour les administrateurs, ACL par rôle, séparation identifiants/embeddings (pseudonymis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ext:p>Sauvegarde des données</text:p>
          </table:table-cell>
          <table:covered-table-cell table:number-columns-repeated="2"/>
          <table:table-cell table:number-columns-spanned="4" table:number-rows-spanned="1" table:style-name="ce112">
            <text:p>Snapshots quotidiens, redondance ZRS, purge automatique après 12 mois d'inactivité (US15)</text:p>
          </table:table-cell>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ext:p>Sans objet — aucun transfert hors UE à ce jour</text:p>
          </table:table-cell>
          <table:table-cell office:value-type="string" table:content-validation-name="val5" table:style-name="ce105"/>
          <table:table-cell office:value-type="string" table:number-columns-spanned="2" table:number-rows-spanned="1" table:content-validation-name="val6" table:style-name="ce129"/>
          <table:covered-table-cell/>
          <table:table-cell table:number-columns-spanned="3" table:number-rows-spanned="1" table:style-name="ce130">
            <text:p>Hébergement exclusif sur les régions Azure UE (France Central + West Europe). Si un transfert devenait nécessaire, des clauses contractuelles types (CCT) seraient mises en place.</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5">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6">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6">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7"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8"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8"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8"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9"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9"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9"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0"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11" table:style-name="ce149">
            <text:p>Andorre</text:p>
          </table:table-cell>
          <table:table-cell office:value-type="string" table:number-columns-spanned="2" table:number-rows-spanned="1" table:content-validation-name="val12"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7">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8">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office:version="1.2">
  <office:meta>
    <dc:creator>FAGET Pauline</dc:creator>
    <dc:date>2020-02-18T13:08:48Z</dc:date>
    <meta:generator>ODFPY/1.4.1</meta:generator>
  </office:meta>
</office:document-meta>
</file>